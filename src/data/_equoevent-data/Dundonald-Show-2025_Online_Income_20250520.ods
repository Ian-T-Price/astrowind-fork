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2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5.773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3.819cm"/>
    </style:style>
    <style:style style:name="co7" style:family="table-column">
      <style:table-column-properties fo:break-before="auto" style:column-width="12.374cm"/>
    </style:style>
    <style:style style:name="co8" style:family="table-column">
      <style:table-column-properties fo:break-before="auto" style:column-width="6.287cm"/>
    </style:style>
    <style:style style:name="co9" style:family="table-column">
      <style:table-column-properties fo:break-before="auto" style:column-width="2.536cm"/>
    </style:style>
    <style:style style:name="co10" style:family="table-column">
      <style:table-column-properties fo:break-before="auto" style:column-width="4.427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2.794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4.676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021cm" fo:break-before="auto" style:use-optimal-row-height="false"/>
    </style:style>
    <style:style style:name="ro2" style:family="table-row">
      <style:table-row-properties style:row-height="1.083cm" fo:break-before="auto" style:use-optimal-row-height="false"/>
    </style:style>
    <style:style style:name="ro3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49">
      <style:table-cell-properties fo:background-color="#8e24aa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49">
      <style:table-cell-properties fo:background-color="#8e24aa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e24aa" style:vertical-align="middl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 style:data-style-name="N104">
      <style:table-cell-properties style:vertical-align="middle"/>
    </style:style>
    <style:style style:name="ce7" style:family="table-cell" style:parent-style-name="Default" style:data-style-name="N11">
      <style:table-cell-properties style:vertical-align="middle"/>
    </style:style>
    <style:style style:name="ce8" style:family="table-cell" style:parent-style-name="Default" style:data-style-name="N104">
      <style:table-cell-properties fo:background-color="#8e24aa" style:vertical-align="middle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quoEvents_Dundonald-Show-2025_Online_Income_2025052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" table:default-cell-style-name="Default"/>
        <table:table-column table:style-name="co17" table:number-columns-repeated="16366" table:default-cell-style-name="ce5"/>
        <table:table-row table:style-name="ro1">
          <table:table-cell table:style-name="ce1" office:value-type="string" calcext:value-type="string">
            <text:p>Totals:</text:p>
          </table:table-cell>
          <table:table-cell table:style-name="ce4" table:number-columns-repeated="11"/>
          <table:table-cell table:style-name="ce8" table:formula="of:=SUM([.M3:.M172])" office:value-type="currency" office:currency="GBP" office:value="1745" calcext:value-type="currency">
            <text:p>£1,745.00</text:p>
          </table:table-cell>
          <table:table-cell table:style-name="ce8" table:formula="of:=SUM([.N3:.N172])" office:value-type="currency" office:currency="GBP" office:value="38.96" calcext:value-type="currency">
            <text:p>£38.96</text:p>
          </table:table-cell>
          <table:table-cell table:style-name="ce8" table:formula="of:=SUM([.O3:.O172])" office:value-type="currency" office:currency="GBP" office:value="1706.04" calcext:value-type="currency">
            <text:p>£1,706.04</text:p>
          </table:table-cell>
          <table:table-cell table:style-name="ce8" table:formula="of:=SUM([.P3:.P172])" office:value-type="currency" office:currency="GBP" office:value="81" calcext:value-type="currency">
            <text:p>£81.00</text:p>
          </table:table-cell>
          <table:table-cell table:number-columns-repeated="2"/>
          <table:table-cell table:style-name="ce6" table:formula="of:=[.O1]-[.N1]" office:value-type="currency" office:currency="GBP" office:value="1667.08" calcext:value-type="currency">
            <text:p>£1,667.08</text:p>
          </table:table-cell>
          <table:table-cell table:number-columns-repeated="16365"/>
        </table:table-row>
        <table:table-row table:style-name="ro2">
          <table:table-cell table:style-name="ce10" office:value-type="string" calcext:value-type="string">
            <text:p>Payment Date</text:p>
          </table:table-cell>
          <table:table-cell table:style-name="ce4" office:value-type="string" calcext:value-type="string">
            <text:p>Competitor Name</text:p>
          </table:table-cell>
          <table:table-cell table:style-name="ce4" office:value-type="string" calcext:value-type="string">
            <text:p>Competitor Emai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Category</text:p>
          </table:table-cell>
          <table:table-cell table:style-name="ce4" office:value-type="string" calcext:value-type="string">
            <text:p>ShowName</text:p>
          </table:table-cell>
          <table:table-cell table:style-name="ce4" office:value-type="string" calcext:value-type="string">
            <text:p>Extra/Class</text:p>
          </table:table-cell>
          <table:table-cell table:style-name="ce4" office:value-type="string" calcext:value-type="string">
            <text:p>Stripe Reference</text:p>
          </table:table-cell>
          <table:table-cell table:style-name="ce4" office:value-type="string" calcext:value-type="string">
            <text:p>Invoice No</text:p>
          </table:table-cell>
          <table:table-cell table:style-name="ce4" office:value-type="string" calcext:value-type="string">
            <text:p>Total Paid to Organiser</text:p>
          </table:table-cell>
          <table:table-cell table:style-name="ce4" office:value-type="string" calcext:value-type="string">
            <text:p>VAT Rate</text:p>
          </table:table-cell>
          <table:table-cell table:style-name="ce4" office:value-type="string" calcext:value-type="string">
            <text:p>VAT Amount</text:p>
          </table:table-cell>
          <table:table-cell table:style-name="ce4" office:value-type="string" calcext:value-type="string">
            <text:p>Net to Organiser</text:p>
          </table:table-cell>
          <table:table-cell table:style-name="ce4" office:value-type="string" calcext:value-type="string">
            <text:p>Stripe Fee</text:p>
          </table:table-cell>
          <table:table-cell table:style-name="ce4" office:value-type="string" calcext:value-type="string">
            <text:p>Transfer to Organiser</text:p>
          </table:table-cell>
          <table:table-cell table:style-name="ce4" office:value-type="string" calcext:value-type="string">
            <text:p>Booking Fee</text:p>
          </table:table-cell>
          <table:table-cell table:number-columns-repeated="16368"/>
        </table:table-row>
        <table:table-row table:style-name="ro3">
          <table:table-cell office:value-type="date" office:date-value="2025-04-04" calcext:value-type="date">
            <text:p>2025-04-04</text:p>
          </table:table-cell>
          <table:table-cell office:value-type="string" calcext:value-type="string">
            <text:p>Test User</text:p>
          </table:table-cell>
          <table:table-cell office:value-type="string" calcext:value-type="string">
            <text:p>test@dundonald-show.org.uk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</text:p>
          </table:table-cell>
          <table:table-cell office:value-type="string" calcext:value-type="string">
            <text:p>ch_3RAITCALpcumAhEI22olsVoS</text:p>
          </table:table-cell>
          <table:table-cell office:value-type="float" office:value="566061" calcext:value-type="float">
            <text:p>566061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04" calcext:value-type="date">
            <text:p>2025-04-04</text:p>
          </table:table-cell>
          <table:table-cell office:value-type="string" calcext:value-type="string">
            <text:p>Test User</text:p>
          </table:table-cell>
          <table:table-cell office:value-type="string" calcext:value-type="string">
            <text:p>test@dundonald-show.org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ch_3RAITCALpcumAhEI22olsVoS</text:p>
          </table:table-cell>
          <table:table-cell office:value-type="float" office:value="566061" calcext:value-type="float">
            <text:p>56606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5" calcext:value-type="currency">
            <text:p>£0.35</text:p>
          </table:table-cell>
          <table:table-cell table:style-name="ce6" office:value-type="currency" office:currency="GBP" office:value="11.65" calcext:value-type="currency">
            <text:p>£11.65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05" calcext:value-type="date">
            <text:p>2025-04-05</text:p>
          </table:table-cell>
          <table:table-cell office:value-type="string" calcext:value-type="string">
            <text:p>Mya Mitchell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ch_3RASCkALpcumAhEI32zSN2kG</text:p>
          </table:table-cell>
          <table:table-cell office:value-type="float" office:value="566080" calcext:value-type="float">
            <text:p>56608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05" calcext:value-type="date">
            <text:p>2025-04-05</text:p>
          </table:table-cell>
          <table:table-cell office:value-type="string" calcext:value-type="string">
            <text:p>Mya Mitchell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ASCkALpcumAhEI32zSN2kG</text:p>
          </table:table-cell>
          <table:table-cell office:value-type="float" office:value="566080" calcext:value-type="float">
            <text:p>56608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2"/>
          <table:table-cell table:style-name="ce6"/>
          <table:table-cell table:number-columns-repeated="16365"/>
        </table:table-row>
        <table:table-row table:style-name="ro3">
          <table:table-cell office:value-type="date" office:date-value="2025-04-05" calcext:value-type="date">
            <text:p>2025-04-05</text:p>
          </table:table-cell>
          <table:table-cell office:value-type="string" calcext:value-type="string">
            <text:p>Daisy Robertson 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1 Ring 3 - Hazard Obedience Course Novice: horses under 14.2</text:p>
          </table:table-cell>
          <table:table-cell office:value-type="string" calcext:value-type="string">
            <text:p>ch_3RAb3DALpcumAhEI3YWDLYym</text:p>
          </table:table-cell>
          <table:table-cell office:value-type="float" office:value="566153" calcext:value-type="float">
            <text:p>56615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11.77" calcext:value-type="currency">
            <text:p>£11.77</text:p>
          </table:table-cell>
          <table:table-cell table:style-name="ce6" office:value-type="currency" office:currency="GBP" office:value="0.37" calcext:value-type="currency">
            <text:p>£0.37</text:p>
          </table:table-cell>
          <table:table-cell table:number-columns-repeated="16368"/>
        </table:table-row>
        <table:table-row table:style-name="ro3">
          <table:table-cell office:value-type="date" office:date-value="2025-04-05" calcext:value-type="date">
            <text:p>2025-04-05</text:p>
          </table:table-cell>
          <table:table-cell office:value-type="string" calcext:value-type="string">
            <text:p>Daisy Robertson 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3 Ring 3 - Hazard Obedience Course Intermediate: horses under 14.2</text:p>
          </table:table-cell>
          <table:table-cell office:value-type="string" calcext:value-type="string">
            <text:p>ch_3RAb3DALpcumAhEI3YWDLYym</text:p>
          </table:table-cell>
          <table:table-cell office:value-type="float" office:value="566153" calcext:value-type="float">
            <text:p>56615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11.77" calcext:value-type="currency">
            <text:p>£11.77</text:p>
          </table:table-cell>
          <table:table-cell table:style-name="ce6" office:value-type="currency" office:currency="GBP" office:value="0.37" calcext:value-type="currency">
            <text:p>£0.37</text:p>
          </table:table-cell>
          <table:table-cell table:number-columns-repeated="16368"/>
        </table:table-row>
        <table:table-row table:style-name="ro3">
          <table:table-cell office:value-type="date" office:date-value="2025-04-05" calcext:value-type="date">
            <text:p>2025-04-05</text:p>
          </table:table-cell>
          <table:table-cell office:value-type="string" calcext:value-type="string">
            <text:p>Daisy Robertson 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3 Ring 2 - Best Turned Out</text:p>
          </table:table-cell>
          <table:table-cell office:value-type="string" calcext:value-type="string">
            <text:p>ch_3RAb3DALpcumAhEI3YWDLYym</text:p>
          </table:table-cell>
          <table:table-cell office:value-type="float" office:value="566153" calcext:value-type="float">
            <text:p>56615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4" calcext:value-type="currency">
            <text:p>£0.24</text:p>
          </table:table-cell>
          <table:table-cell table:style-name="ce6" office:value-type="currency" office:currency="GBP" office:value="11.76" calcext:value-type="currency">
            <text:p>£11.76</text:p>
          </table:table-cell>
          <table:table-cell table:style-name="ce6" office:value-type="currency" office:currency="GBP" office:value="0.38" calcext:value-type="currency">
            <text:p>£0.38</text:p>
          </table:table-cell>
          <table:table-cell table:number-columns-repeated="16368"/>
        </table:table-row>
        <table:table-row table:style-name="ro3">
          <table:table-cell office:value-type="date" office:date-value="2025-04-05" calcext:value-type="date">
            <text:p>2025-04-05</text:p>
          </table:table-cell>
          <table:table-cell office:value-type="string" calcext:value-type="string">
            <text:p>Daisy Robertson 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ch_3RAb3DALpcumAhEI3YWDLYym</text:p>
          </table:table-cell>
          <table:table-cell office:value-type="float" office:value="566153" calcext:value-type="float">
            <text:p>56615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4" calcext:value-type="currency">
            <text:p>£0.24</text:p>
          </table:table-cell>
          <table:table-cell table:style-name="ce6" office:value-type="currency" office:currency="GBP" office:value="11.76" calcext:value-type="currency">
            <text:p>£11.76</text:p>
          </table:table-cell>
          <table:table-cell table:style-name="ce6" office:value-type="currency" office:currency="GBP" office:value="0.38" calcext:value-type="currency">
            <text:p>£0.38</text:p>
          </table:table-cell>
          <table:table-cell table:number-columns-repeated="16368"/>
        </table:table-row>
        <table:table-row table:style-name="ro3">
          <table:table-cell office:value-type="date" office:date-value="2025-04-07" calcext:value-type="date">
            <text:p>2025-04-07</text:p>
          </table:table-cell>
          <table:table-cell office:value-type="string" calcext:value-type="string">
            <text:p>Jane <text:s/>McCulloch 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</text:p>
          </table:table-cell>
          <table:table-cell office:value-type="string" calcext:value-type="string">
            <text:p>ch_3RBHMVALpcumAhEI2r2HyAhQ</text:p>
          </table:table-cell>
          <table:table-cell office:value-type="float" office:value="566466" calcext:value-type="float">
            <text:p>566466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07" calcext:value-type="date">
            <text:p>2025-04-07</text:p>
          </table:table-cell>
          <table:table-cell office:value-type="string" calcext:value-type="string">
            <text:p>Kathryn Martin</text:p>
          </table:table-cell>
          <table:table-cell office:value-type="string" calcext:value-type="string">
            <text:p>kathrynmartin685@yahoo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4 Ring 2 - Concours du Elegance: Any height</text:p>
          </table:table-cell>
          <table:table-cell office:value-type="string" calcext:value-type="string">
            <text:p>ch_3RBDrkALpcumAhEI3zxYP48G</text:p>
          </table:table-cell>
          <table:table-cell office:value-type="float" office:value="566431" calcext:value-type="float">
            <text:p>56643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07" calcext:value-type="date">
            <text:p>2025-04-07</text:p>
          </table:table-cell>
          <table:table-cell office:value-type="string" calcext:value-type="string">
            <text:p>Kathryn Martin</text:p>
          </table:table-cell>
          <table:table-cell office:value-type="string" calcext:value-type="string">
            <text:p>kathrynmartin685@yahoo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ch_3RBDrkALpcumAhEI3zxYP48G</text:p>
          </table:table-cell>
          <table:table-cell office:value-type="float" office:value="566431" calcext:value-type="float">
            <text:p>56643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07" calcext:value-type="date">
            <text:p>2025-04-07</text:p>
          </table:table-cell>
          <table:table-cell office:value-type="string" calcext:value-type="string">
            <text:p>Jane <text:s/>McCulloch 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ch_3RBHMVALpcumAhEI2r2HyAhQ</text:p>
          </table:table-cell>
          <table:table-cell office:value-type="float" office:value="566466" calcext:value-type="float">
            <text:p>56646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07" calcext:value-type="date">
            <text:p>2025-04-07</text:p>
          </table:table-cell>
          <table:table-cell office:value-type="string" calcext:value-type="string">
            <text:p>Jane <text:s/>McCulloch 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1 Ring 2 - Riding Club Equine: Open, over 14.2</text:p>
          </table:table-cell>
          <table:table-cell office:value-type="string" calcext:value-type="string">
            <text:p>ch_3RBHMVALpcumAhEI2r2HyAhQ</text:p>
          </table:table-cell>
          <table:table-cell office:value-type="float" office:value="566466" calcext:value-type="float">
            <text:p>56646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Alison Drummond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</text:p>
          </table:table-cell>
          <table:table-cell office:value-type="string" calcext:value-type="string">
            <text:p>ch_3RBivyALpcumAhEI1XEzUlDA</text:p>
          </table:table-cell>
          <table:table-cell office:value-type="float" office:value="566724" calcext:value-type="float">
            <text:p>566724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" calcext:value-type="currency">
            <text:p>£0.10</text:p>
          </table:table-cell>
          <table:table-cell table:style-name="ce6" office:value-type="currency" office:currency="GBP" office:value="4.9" calcext:value-type="currency">
            <text:p>£4.90</text:p>
          </table:table-cell>
          <table:table-cell table:number-columns-repeated="16369"/>
        </table:table-row>
        <table:table-row table:style-name="ro3"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Mya Mitchell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6 Ring 4 – <text:s/>Showjumping: 60cm</text:p>
          </table:table-cell>
          <table:table-cell office:value-type="string" calcext:value-type="string">
            <text:p>ch_3RBiMpALpcumAhEI3lFUcAMX</text:p>
          </table:table-cell>
          <table:table-cell office:value-type="float" office:value="566705" calcext:value-type="float">
            <text:p>566705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Mya Mitchell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7 Ring 4 – <text:s/>Showjumping: 70cm</text:p>
          </table:table-cell>
          <table:table-cell office:value-type="string" calcext:value-type="string">
            <text:p>ch_3RBiMpALpcumAhEI3lFUcAMX</text:p>
          </table:table-cell>
          <table:table-cell office:value-type="float" office:value="566705" calcext:value-type="float">
            <text:p>566705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Alison Drummond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BivyALpcumAhEI1XEzUlDA</text:p>
          </table:table-cell>
          <table:table-cell office:value-type="float" office:value="566724" calcext:value-type="float">
            <text:p>56672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Alison Drummond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4 Ring 3 - Hazard Obedience Course Intermediate: horses over 14.2</text:p>
          </table:table-cell>
          <table:table-cell office:value-type="string" calcext:value-type="string">
            <text:p>ch_3RBivyALpcumAhEI1XEzUlDA</text:p>
          </table:table-cell>
          <table:table-cell office:value-type="float" office:value="566724" calcext:value-type="float">
            <text:p>56672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Alison Drummond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6 Ring 3 - Hazard Obedience Course Open: horses over 14.2</text:p>
          </table:table-cell>
          <table:table-cell office:value-type="string" calcext:value-type="string">
            <text:p>ch_3RBivyALpcumAhEI1XEzUlDA</text:p>
          </table:table-cell>
          <table:table-cell office:value-type="float" office:value="566724" calcext:value-type="float">
            <text:p>56672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2" calcext:value-type="date">
            <text:p>2025-04-12</text:p>
          </table:table-cell>
          <table:table-cell office:value-type="string" calcext:value-type="string">
            <text:p>Sarah Bennett</text:p>
          </table:table-cell>
          <table:table-cell office:value-type="string" calcext:value-type="string">
            <text:p>Sarahomg26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4 Ring 4 – <text:s/>Showjumping: 40cm</text:p>
          </table:table-cell>
          <table:table-cell office:value-type="string" calcext:value-type="string">
            <text:p>ch_3RD4VKALpcumAhEI2p72opVO</text:p>
          </table:table-cell>
          <table:table-cell office:value-type="float" office:value="567206" calcext:value-type="float">
            <text:p>56720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2" calcext:value-type="date">
            <text:p>2025-04-12</text:p>
          </table:table-cell>
          <table:table-cell office:value-type="string" calcext:value-type="string">
            <text:p>Sarah Bennett</text:p>
          </table:table-cell>
          <table:table-cell office:value-type="string" calcext:value-type="string">
            <text:p>Sarahomg26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5 Ring 4 – <text:s/>Showjumping: 50cm</text:p>
          </table:table-cell>
          <table:table-cell office:value-type="string" calcext:value-type="string">
            <text:p>ch_3RD4VKALpcumAhEI2p72opVO</text:p>
          </table:table-cell>
          <table:table-cell office:value-type="float" office:value="567206" calcext:value-type="float">
            <text:p>56720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4" calcext:value-type="date">
            <text:p>2025-04-14</text:p>
          </table:table-cell>
          <table:table-cell office:value-type="string" calcext:value-type="string">
            <text:p>Gabriella <text:s/>Crawford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</text:p>
          </table:table-cell>
          <table:table-cell office:value-type="string" calcext:value-type="string">
            <text:p>ch_3RDuPlALpcumAhEI3vCAV39F</text:p>
          </table:table-cell>
          <table:table-cell office:value-type="float" office:value="567587" calcext:value-type="float">
            <text:p>567587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14" calcext:value-type="date">
            <text:p>2025-04-14</text:p>
          </table:table-cell>
          <table:table-cell office:value-type="string" calcext:value-type="string">
            <text:p>Karen Lyon</text:p>
          </table:table-cell>
          <table:table-cell office:value-type="string" calcext:value-type="string">
            <text:p>karenscotland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4 Ring 2 - Concours du Elegance: Any height</text:p>
          </table:table-cell>
          <table:table-cell office:value-type="string" calcext:value-type="string">
            <text:p>ch_3RDpOvALpcumAhEI055xIeJ4</text:p>
          </table:table-cell>
          <table:table-cell office:value-type="float" office:value="567512" calcext:value-type="float">
            <text:p>56751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4" calcext:value-type="date">
            <text:p>2025-04-14</text:p>
          </table:table-cell>
          <table:table-cell office:value-type="string" calcext:value-type="string">
            <text:p>Karen Lyon</text:p>
          </table:table-cell>
          <table:table-cell office:value-type="string" calcext:value-type="string">
            <text:p>karenscotland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ch_3RDpOvALpcumAhEI055xIeJ4</text:p>
          </table:table-cell>
          <table:table-cell office:value-type="float" office:value="567512" calcext:value-type="float">
            <text:p>56751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4" calcext:value-type="date">
            <text:p>2025-04-14</text:p>
          </table:table-cell>
          <table:table-cell office:value-type="string" calcext:value-type="string">
            <text:p>Gabriella <text:s/>Crawford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4 Ring 1 - Working Hunter: 50cm</text:p>
          </table:table-cell>
          <table:table-cell office:value-type="string" calcext:value-type="string">
            <text:p>ch_3RDuPlALpcumAhEI3vCAV39F</text:p>
          </table:table-cell>
          <table:table-cell office:value-type="float" office:value="567587" calcext:value-type="float">
            <text:p>56758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4" calcext:value-type="date">
            <text:p>2025-04-14</text:p>
          </table:table-cell>
          <table:table-cell office:value-type="string" calcext:value-type="string">
            <text:p>Gabriella <text:s/>Crawford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ch_3RDuPlALpcumAhEI3vCAV39F</text:p>
          </table:table-cell>
          <table:table-cell office:value-type="float" office:value="567587" calcext:value-type="float">
            <text:p>56758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5" calcext:value-type="date">
            <text:p>2025-04-15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</text:p>
          </table:table-cell>
          <table:table-cell office:value-type="string" calcext:value-type="string">
            <text:p>ch_3RE5EkALpcumAhEI1p7ft231</text:p>
          </table:table-cell>
          <table:table-cell office:value-type="float" office:value="567619" calcext:value-type="float">
            <text:p>567619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15" calcext:value-type="date">
            <text:p>2025-04-15</text:p>
          </table:table-cell>
          <table:table-cell office:value-type="string" calcext:value-type="string">
            <text:p>Rachel Sherry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</text:p>
          </table:table-cell>
          <table:table-cell office:value-type="string" calcext:value-type="string">
            <text:p>ch_3REB8aALpcumAhEI2ZT17Mm1</text:p>
          </table:table-cell>
          <table:table-cell office:value-type="float" office:value="567674" calcext:value-type="float">
            <text:p>567674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4.77" calcext:value-type="currency">
            <text:p>£4.77</text:p>
          </table:table-cell>
          <table:table-cell table:number-columns-repeated="16369"/>
        </table:table-row>
        <table:table-row table:style-name="ro3">
          <table:table-cell office:value-type="date" office:date-value="2025-04-15" calcext:value-type="date">
            <text:p>2025-04-15</text:p>
          </table:table-cell>
          <table:table-cell office:value-type="string" calcext:value-type="string">
            <text:p>Dawn Dalgleish</text:p>
          </table:table-cell>
          <table:table-cell office:value-type="string" calcext:value-type="string">
            <text:p>dawndalgleish77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</text:p>
          </table:table-cell>
          <table:table-cell office:value-type="string" calcext:value-type="string">
            <text:p>ch_3REFLNALpcumAhEI2T5aFNNj</text:p>
          </table:table-cell>
          <table:table-cell office:value-type="float" office:value="567729" calcext:value-type="float">
            <text:p>567729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5" calcext:value-type="currency">
            <text:p>£0.15</text:p>
          </table:table-cell>
          <table:table-cell table:style-name="ce6" office:value-type="currency" office:currency="GBP" office:value="4.85" calcext:value-type="currency">
            <text:p>£4.85</text:p>
          </table:table-cell>
          <table:table-cell table:number-columns-repeated="16369"/>
        </table:table-row>
        <table:table-row table:style-name="ro3">
          <table:table-cell office:value-type="date" office:date-value="2025-04-15" calcext:value-type="date">
            <text:p>2025-04-15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5 Ring 4 – <text:s/>Showjumping: 50cm</text:p>
          </table:table-cell>
          <table:table-cell office:value-type="string" calcext:value-type="string">
            <text:p>ch_3RE5EkALpcumAhEI1p7ft231</text:p>
          </table:table-cell>
          <table:table-cell office:value-type="float" office:value="567619" calcext:value-type="float">
            <text:p>56761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5" calcext:value-type="date">
            <text:p>2025-04-15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6 Ring 4 – <text:s/>Showjumping: 60cm</text:p>
          </table:table-cell>
          <table:table-cell office:value-type="string" calcext:value-type="string">
            <text:p>ch_3RE5EkALpcumAhEI1p7ft231</text:p>
          </table:table-cell>
          <table:table-cell office:value-type="float" office:value="567619" calcext:value-type="float">
            <text:p>56761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5" calcext:value-type="date">
            <text:p>2025-04-15</text:p>
          </table:table-cell>
          <table:table-cell office:value-type="string" calcext:value-type="string">
            <text:p>Rachel Sherry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2 Ring 2 - Ridden Hunter: Open, over 14.2</text:p>
          </table:table-cell>
          <table:table-cell office:value-type="string" calcext:value-type="string">
            <text:p>ch_3REB6tALpcumAhEI0NaLeGl2</text:p>
          </table:table-cell>
          <table:table-cell office:value-type="float" office:value="567673" calcext:value-type="float">
            <text:p>56767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5" calcext:value-type="date">
            <text:p>2025-04-15</text:p>
          </table:table-cell>
          <table:table-cell office:value-type="string" calcext:value-type="string">
            <text:p>Rachel Sherry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3 Ring 2 - Best Turned Out</text:p>
          </table:table-cell>
          <table:table-cell office:value-type="string" calcext:value-type="string">
            <text:p>ch_3REB6tALpcumAhEI0NaLeGl2</text:p>
          </table:table-cell>
          <table:table-cell office:value-type="float" office:value="567673" calcext:value-type="float">
            <text:p>56767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5" calcext:value-type="date">
            <text:p>2025-04-15</text:p>
          </table:table-cell>
          <table:table-cell office:value-type="string" calcext:value-type="string">
            <text:p>Dawn Dalgleish</text:p>
          </table:table-cell>
          <table:table-cell office:value-type="string" calcext:value-type="string">
            <text:p>dawndalgleish77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ch_3REFLNALpcumAhEI2T5aFNNj</text:p>
          </table:table-cell>
          <table:table-cell office:value-type="float" office:value="567729" calcext:value-type="float">
            <text:p>56772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4" calcext:value-type="currency">
            <text:p>£0.40</text:p>
          </table:table-cell>
          <table:table-cell table:style-name="ce6" office:value-type="currency" office:currency="GBP" office:value="11.6" calcext:value-type="currency">
            <text:p>£11.60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17" calcext:value-type="date">
            <text:p>2025-04-17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</text:p>
          </table:table-cell>
          <table:table-cell office:value-type="string" calcext:value-type="string">
            <text:p>ch_3REsKqALpcumAhEI1ySSOnDm</text:p>
          </table:table-cell>
          <table:table-cell office:value-type="float" office:value="568012" calcext:value-type="float">
            <text:p>568012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" calcext:value-type="currency">
            <text:p>£0.10</text:p>
          </table:table-cell>
          <table:table-cell table:style-name="ce6" office:value-type="currency" office:currency="GBP" office:value="4.9" calcext:value-type="currency">
            <text:p>£4.90</text:p>
          </table:table-cell>
          <table:table-cell table:number-columns-repeated="16369"/>
        </table:table-row>
        <table:table-row table:style-name="ro3">
          <table:table-cell office:value-type="date" office:date-value="2025-04-17" calcext:value-type="date">
            <text:p>2025-04-17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3 Ring 1 - Working Hunter: 40cm</text:p>
          </table:table-cell>
          <table:table-cell office:value-type="string" calcext:value-type="string">
            <text:p>ch_3REsKqALpcumAhEI1ySSOnDm</text:p>
          </table:table-cell>
          <table:table-cell office:value-type="float" office:value="568012" calcext:value-type="float">
            <text:p>56801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7" calcext:value-type="date">
            <text:p>2025-04-17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4 Ring 1 - Working Hunter: 50cm</text:p>
          </table:table-cell>
          <table:table-cell office:value-type="string" calcext:value-type="string">
            <text:p>ch_3REsKqALpcumAhEI1ySSOnDm</text:p>
          </table:table-cell>
          <table:table-cell office:value-type="float" office:value="568012" calcext:value-type="float">
            <text:p>56801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7" calcext:value-type="date">
            <text:p>2025-04-17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EsKqALpcumAhEI1ySSOnDm</text:p>
          </table:table-cell>
          <table:table-cell office:value-type="float" office:value="568012" calcext:value-type="float">
            <text:p>56801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7" calcext:value-type="date">
            <text:p>2025-04-17</text:p>
          </table:table-cell>
          <table:table-cell office:value-type="string" calcext:value-type="string">
            <text:p>Samantha Cloy</text:p>
          </table:table-cell>
          <table:table-cell office:value-type="string" calcext:value-type="string">
            <text:p>sam4fayre@yahoo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1 Ring 2 - Riding Club Equine: Open, over 14.2</text:p>
          </table:table-cell>
          <table:table-cell office:value-type="string" calcext:value-type="string">
            <text:p>ch_3REuDsALpcumAhEI1Ga79v6D</text:p>
          </table:table-cell>
          <table:table-cell office:value-type="float" office:value="568027" calcext:value-type="float">
            <text:p>56802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7" calcext:value-type="date">
            <text:p>2025-04-17</text:p>
          </table:table-cell>
          <table:table-cell office:value-type="string" calcext:value-type="string">
            <text:p>Samantha Cloy</text:p>
          </table:table-cell>
          <table:table-cell office:value-type="string" calcext:value-type="string">
            <text:p>sam4fayre@yahoo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2 Ring 2 - Ridden Hunter: Open, over 14.2</text:p>
          </table:table-cell>
          <table:table-cell office:value-type="string" calcext:value-type="string">
            <text:p>ch_3REuDsALpcumAhEI1Ga79v6D</text:p>
          </table:table-cell>
          <table:table-cell office:value-type="float" office:value="568027" calcext:value-type="float">
            <text:p>56802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17" calcext:value-type="date">
            <text:p>2025-04-17</text:p>
          </table:table-cell>
          <table:table-cell office:value-type="string" calcext:value-type="string">
            <text:p>Mollie Miller-smith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3 Ring 2 - Best Turned Out</text:p>
          </table:table-cell>
          <table:table-cell office:value-type="string" calcext:value-type="string">
            <text:p>ch_3REzIxALpcumAhEI2V6uBTHo</text:p>
          </table:table-cell>
          <table:table-cell office:value-type="float" office:value="568084" calcext:value-type="float">
            <text:p>56808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7" calcext:value-type="date">
            <text:p>2025-04-17</text:p>
          </table:table-cell>
          <table:table-cell office:value-type="string" calcext:value-type="string">
            <text:p>Mollie Miller-smith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ch_3REzIxALpcumAhEI2V6uBTHo</text:p>
          </table:table-cell>
          <table:table-cell office:value-type="float" office:value="568084" calcext:value-type="float">
            <text:p>56808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7" calcext:value-type="date">
            <text:p>2025-04-17</text:p>
          </table:table-cell>
          <table:table-cell office:value-type="string" calcext:value-type="string">
            <text:p>Mollie Miller-smith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1 Ring 3 - Hazard Obedience Course Novice: horses under 14.2</text:p>
          </table:table-cell>
          <table:table-cell office:value-type="string" calcext:value-type="string">
            <text:p>ch_3REzIxALpcumAhEI2V6uBTHo</text:p>
          </table:table-cell>
          <table:table-cell office:value-type="float" office:value="568084" calcext:value-type="float">
            <text:p>56808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8" calcext:value-type="date">
            <text:p>2025-04-18</text:p>
          </table:table-cell>
          <table:table-cell office:value-type="string" calcext:value-type="string">
            <text:p>LEA ANN JOHNSTONE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</text:p>
          </table:table-cell>
          <table:table-cell office:value-type="string" calcext:value-type="string">
            <text:p>ch_3RFNTKALpcumAhEI1d8iBG4I</text:p>
          </table:table-cell>
          <table:table-cell office:value-type="float" office:value="568219" calcext:value-type="float">
            <text:p>568219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4.77" calcext:value-type="currency">
            <text:p>£4.77</text:p>
          </table:table-cell>
          <table:table-cell table:number-columns-repeated="16369"/>
        </table:table-row>
        <table:table-row table:style-name="ro3">
          <table:table-cell office:value-type="date" office:date-value="2025-04-18" calcext:value-type="date">
            <text:p>2025-04-18</text:p>
          </table:table-cell>
          <table:table-cell office:value-type="string" calcext:value-type="string">
            <text:p>LEA ANN JOHNSTONE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2 Ring 1 - Working Hunter: 30cm</text:p>
          </table:table-cell>
          <table:table-cell office:value-type="string" calcext:value-type="string">
            <text:p>ch_3RFN1QALpcumAhEI0VrXzr7h</text:p>
          </table:table-cell>
          <table:table-cell office:value-type="float" office:value="568218" calcext:value-type="float">
            <text:p>568218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8" calcext:value-type="date">
            <text:p>2025-04-18</text:p>
          </table:table-cell>
          <table:table-cell office:value-type="string" calcext:value-type="string">
            <text:p>LEA ANN JOHNSTONE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3 Ring 1 - Working Hunter: 40cm</text:p>
          </table:table-cell>
          <table:table-cell office:value-type="string" calcext:value-type="string">
            <text:p>ch_3RFN1QALpcumAhEI0VrXzr7h</text:p>
          </table:table-cell>
          <table:table-cell office:value-type="float" office:value="568218" calcext:value-type="float">
            <text:p>568218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8" calcext:value-type="date">
            <text:p>2025-04-18</text:p>
          </table:table-cell>
          <table:table-cell office:value-type="string" calcext:value-type="string">
            <text:p>LEA ANN JOHNSTONE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FN1QALpcumAhEI0VrXzr7h</text:p>
          </table:table-cell>
          <table:table-cell office:value-type="float" office:value="568218" calcext:value-type="float">
            <text:p>568218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9" calcext:value-type="date">
            <text:p>2025-04-19</text:p>
          </table:table-cell>
          <table:table-cell office:value-type="string" calcext:value-type="string">
            <text:p>Laura Meader</text:p>
          </table:table-cell>
          <table:table-cell office:value-type="string" calcext:value-type="string">
            <text:p>lmeaderphotography@outlook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FcgsALpcumAhEI0qJeSCD2</text:p>
          </table:table-cell>
          <table:table-cell office:value-type="float" office:value="568272" calcext:value-type="float">
            <text:p>568272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19" calcext:value-type="date">
            <text:p>2025-04-19</text:p>
          </table:table-cell>
          <table:table-cell office:value-type="string" calcext:value-type="string">
            <text:p>Danielle Scott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Fif1ALpcumAhEI2US7zZJh</text:p>
          </table:table-cell>
          <table:table-cell office:value-type="float" office:value="568338" calcext:value-type="float">
            <text:p>568338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" calcext:value-type="currency">
            <text:p>£0.10</text:p>
          </table:table-cell>
          <table:table-cell table:style-name="ce6" office:value-type="currency" office:currency="GBP" office:value="4.9" calcext:value-type="currency">
            <text:p>£4.90</text:p>
          </table:table-cell>
          <table:table-cell table:number-columns-repeated="16369"/>
        </table:table-row>
        <table:table-row table:style-name="ro3">
          <table:table-cell office:value-type="date" office:date-value="2025-04-19" calcext:value-type="date">
            <text:p>2025-04-19</text:p>
          </table:table-cell>
          <table:table-cell office:value-type="string" calcext:value-type="string">
            <text:p>Laura Meader</text:p>
          </table:table-cell>
          <table:table-cell office:value-type="string" calcext:value-type="string">
            <text:p>lmeaderphotography@outlook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2 Ring 2 - Ridden Hunter: Open, over 14.2</text:p>
          </table:table-cell>
          <table:table-cell office:value-type="string" calcext:value-type="string">
            <text:p>ch_3RFcgsALpcumAhEI0qJeSCD2</text:p>
          </table:table-cell>
          <table:table-cell office:value-type="float" office:value="568272" calcext:value-type="float">
            <text:p>56827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5" calcext:value-type="currency">
            <text:p>£0.35</text:p>
          </table:table-cell>
          <table:table-cell table:style-name="ce6" office:value-type="currency" office:currency="GBP" office:value="11.65" calcext:value-type="currency">
            <text:p>£11.65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19" calcext:value-type="date">
            <text:p>2025-04-19</text:p>
          </table:table-cell>
          <table:table-cell office:value-type="string" calcext:value-type="string">
            <text:p>Danielle Scott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4 Ring 2 - Concours du Elegance: Any height</text:p>
          </table:table-cell>
          <table:table-cell office:value-type="string" calcext:value-type="string">
            <text:p>ch_3RFif1ALpcumAhEI2US7zZJh</text:p>
          </table:table-cell>
          <table:table-cell office:value-type="float" office:value="568338" calcext:value-type="float">
            <text:p>568338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9" calcext:value-type="date">
            <text:p>2025-04-19</text:p>
          </table:table-cell>
          <table:table-cell office:value-type="string" calcext:value-type="string">
            <text:p>Danielle Scott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4 Ring 3 - Hazard Obedience Course Intermediate: horses over 14.2</text:p>
          </table:table-cell>
          <table:table-cell office:value-type="string" calcext:value-type="string">
            <text:p>ch_3RFif1ALpcumAhEI2US7zZJh</text:p>
          </table:table-cell>
          <table:table-cell office:value-type="float" office:value="568338" calcext:value-type="float">
            <text:p>568338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19" calcext:value-type="date">
            <text:p>2025-04-19</text:p>
          </table:table-cell>
          <table:table-cell office:value-type="string" calcext:value-type="string">
            <text:p>Danielle Scott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5 Ring 3 - Hazard Obedience Course Open: horses under 14.2</text:p>
          </table:table-cell>
          <table:table-cell office:value-type="string" calcext:value-type="string">
            <text:p>ch_3RFif1ALpcumAhEI2US7zZJh</text:p>
          </table:table-cell>
          <table:table-cell office:value-type="float" office:value="568338" calcext:value-type="float">
            <text:p>568338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20" calcext:value-type="date">
            <text:p>2025-04-20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0t4ALpcumAhEI3W2stSbT</text:p>
          </table:table-cell>
          <table:table-cell office:value-type="float" office:value="568414" calcext:value-type="float">
            <text:p>568414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0" calcext:value-type="date">
            <text:p>2025-04-20</text:p>
          </table:table-cell>
          <table:table-cell office:value-type="string" calcext:value-type="string">
            <text:p>Fiona Taylor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30iALpcumAhEI1nKahUiy</text:p>
          </table:table-cell>
          <table:table-cell office:value-type="float" office:value="568447" calcext:value-type="float">
            <text:p>568447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0" calcext:value-type="date">
            <text:p>2025-04-20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5 Ring 2 - Lead Rein &amp; Thelwell type pony </text:p>
          </table:table-cell>
          <table:table-cell office:value-type="string" calcext:value-type="string">
            <text:p>ch_3RG0t4ALpcumAhEI3W2stSbT</text:p>
          </table:table-cell>
          <table:table-cell office:value-type="float" office:value="568414" calcext:value-type="float">
            <text:p>56841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0" calcext:value-type="date">
            <text:p>2025-04-20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G0t4ALpcumAhEI3W2stSbT</text:p>
          </table:table-cell>
          <table:table-cell office:value-type="float" office:value="568414" calcext:value-type="float">
            <text:p>56841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0" calcext:value-type="date">
            <text:p>2025-04-20</text:p>
          </table:table-cell>
          <table:table-cell office:value-type="string" calcext:value-type="string">
            <text:p>Fiona Taylor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G30iALpcumAhEI1nKahUiy</text:p>
          </table:table-cell>
          <table:table-cell office:value-type="float" office:value="568447" calcext:value-type="float">
            <text:p>56844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0" calcext:value-type="date">
            <text:p>2025-04-20</text:p>
          </table:table-cell>
          <table:table-cell office:value-type="string" calcext:value-type="string">
            <text:p>Fiona Taylor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8 Ring 4 – <text:s/>Showjumping: 80cm</text:p>
          </table:table-cell>
          <table:table-cell office:value-type="string" calcext:value-type="string">
            <text:p>ch_3RG30iALpcumAhEI1nKahUiy</text:p>
          </table:table-cell>
          <table:table-cell office:value-type="float" office:value="568447" calcext:value-type="float">
            <text:p>56844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Kim Cleeve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I4rALpcumAhEI2WVUAhUJ</text:p>
          </table:table-cell>
          <table:table-cell office:value-type="float" office:value="568540" calcext:value-type="float">
            <text:p>56854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" calcext:value-type="currency">
            <text:p>£0.10</text:p>
          </table:table-cell>
          <table:table-cell table:style-name="ce6" office:value-type="currency" office:currency="GBP" office:value="4.9" calcext:value-type="currency">
            <text:p>£4.90</text:p>
          </table:table-cell>
          <table:table-cell table:number-columns-repeated="16369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Milli McClure</text:p>
          </table:table-cell>
          <table:table-cell office:value-type="string" calcext:value-type="string">
            <text:p>millimcclure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Ls9ALpcumAhEI2GuhZKeS</text:p>
          </table:table-cell>
          <table:table-cell office:value-type="float" office:value="568581" calcext:value-type="float">
            <text:p>568581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Debbie Stewart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MBDALpcumAhEI2GknmTFY</text:p>
          </table:table-cell>
          <table:table-cell office:value-type="float" office:value="568585" calcext:value-type="float">
            <text:p>568585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Carolyn Murdoch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NmPALpcumAhEI170ge7wg</text:p>
          </table:table-cell>
          <table:table-cell office:value-type="float" office:value="568622" calcext:value-type="float">
            <text:p>568622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june bell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NpmALpcumAhEI1GDHzGnB</text:p>
          </table:table-cell>
          <table:table-cell office:value-type="float" office:value="568623" calcext:value-type="float">
            <text:p>568623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Lynsey Mcarthur</text:p>
          </table:table-cell>
          <table:table-cell office:value-type="string" calcext:value-type="string">
            <text:p>mcarthurlynsey@yahoo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OfSALpcumAhEI0hGlDs1i</text:p>
          </table:table-cell>
          <table:table-cell office:value-type="float" office:value="568634" calcext:value-type="float">
            <text:p>568634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Q3PALpcumAhEI2wcLFpMT</text:p>
          </table:table-cell>
          <table:table-cell office:value-type="float" office:value="568686" calcext:value-type="float">
            <text:p>568686</text:p>
          </table:table-cell>
          <table:table-cell table:style-name="ce6" office:value-type="currency" office:currency="GBP" office:value="10" calcext:value-type="currency">
            <text:p>£10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0" calcext:value-type="currency">
            <text:p>£10.00</text:p>
          </table:table-cell>
          <table:table-cell table:style-name="ce6" office:value-type="currency" office:currency="GBP" office:value="0.19" calcext:value-type="currency">
            <text:p>£0.19</text:p>
          </table:table-cell>
          <table:table-cell table:style-name="ce6" office:value-type="currency" office:currency="GBP" office:value="9.81" calcext:value-type="currency">
            <text:p>£9.81</text:p>
          </table:table-cell>
          <table:table-cell table:number-columns-repeated="16369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Izzy Miller-Smith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Q5xALpcumAhEI0saF2hzn</text:p>
          </table:table-cell>
          <table:table-cell office:value-type="float" office:value="568688" calcext:value-type="float">
            <text:p>568688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Kim Cleeve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3 Ring 1 - Working Hunter: 40cm</text:p>
          </table:table-cell>
          <table:table-cell office:value-type="string" calcext:value-type="string">
            <text:p>ch_3RGI4rALpcumAhEI2WVUAhUJ</text:p>
          </table:table-cell>
          <table:table-cell office:value-type="float" office:value="568540" calcext:value-type="float">
            <text:p>56854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Kim Cleeve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1 Ring 2 - Riding Club Equine: Open, over 14.2</text:p>
          </table:table-cell>
          <table:table-cell office:value-type="string" calcext:value-type="string">
            <text:p>ch_3RGI4rALpcumAhEI2WVUAhUJ</text:p>
          </table:table-cell>
          <table:table-cell office:value-type="float" office:value="568540" calcext:value-type="float">
            <text:p>56854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Kim Cleeve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GI4rALpcumAhEI2WVUAhUJ</text:p>
          </table:table-cell>
          <table:table-cell office:value-type="float" office:value="568540" calcext:value-type="float">
            <text:p>56854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Milli McClure</text:p>
          </table:table-cell>
          <table:table-cell office:value-type="string" calcext:value-type="string">
            <text:p>millimcclure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GLs9ALpcumAhEI2GuhZKeS</text:p>
          </table:table-cell>
          <table:table-cell office:value-type="float" office:value="568581" calcext:value-type="float">
            <text:p>56858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5" calcext:value-type="currency">
            <text:p>£0.35</text:p>
          </table:table-cell>
          <table:table-cell table:style-name="ce6" office:value-type="currency" office:currency="GBP" office:value="11.65" calcext:value-type="currency">
            <text:p>£11.65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Debbie Stewart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GMBDALpcumAhEI2GknmTFY</text:p>
          </table:table-cell>
          <table:table-cell office:value-type="float" office:value="568585" calcext:value-type="float">
            <text:p>568585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Debbie Stewart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ch_3RGMBDALpcumAhEI2GknmTFY</text:p>
          </table:table-cell>
          <table:table-cell office:value-type="float" office:value="568585" calcext:value-type="float">
            <text:p>568585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Carolyn Murdoch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2 Ring 3 - Hazard Obedience Course Novice: horses over 14.2</text:p>
          </table:table-cell>
          <table:table-cell office:value-type="string" calcext:value-type="string">
            <text:p>ch_3RGNmPALpcumAhEI170ge7wg</text:p>
          </table:table-cell>
          <table:table-cell office:value-type="float" office:value="568622" calcext:value-type="float">
            <text:p>56862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Carolyn Murdoch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4 Ring 3 - Hazard Obedience Course Intermediate: horses over 14.2</text:p>
          </table:table-cell>
          <table:table-cell office:value-type="string" calcext:value-type="string">
            <text:p>ch_3RGNmPALpcumAhEI170ge7wg</text:p>
          </table:table-cell>
          <table:table-cell office:value-type="float" office:value="568622" calcext:value-type="float">
            <text:p>56862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june bell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2 Ring 3 - Hazard Obedience Course Novice: horses over 14.2</text:p>
          </table:table-cell>
          <table:table-cell office:value-type="string" calcext:value-type="string">
            <text:p>ch_3RGNpmALpcumAhEI1GDHzGnB</text:p>
          </table:table-cell>
          <table:table-cell office:value-type="float" office:value="568623" calcext:value-type="float">
            <text:p>56862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june bell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4 Ring 3 - Hazard Obedience Course Intermediate: horses over 14.2</text:p>
          </table:table-cell>
          <table:table-cell office:value-type="string" calcext:value-type="string">
            <text:p>ch_3RGNpmALpcumAhEI1GDHzGnB</text:p>
          </table:table-cell>
          <table:table-cell office:value-type="float" office:value="568623" calcext:value-type="float">
            <text:p>56862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Lynsey Mcarthur</text:p>
          </table:table-cell>
          <table:table-cell office:value-type="string" calcext:value-type="string">
            <text:p>mcarthurlynsey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GOfSALpcumAhEI0hGlDs1i</text:p>
          </table:table-cell>
          <table:table-cell office:value-type="float" office:value="568634" calcext:value-type="float">
            <text:p>56863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5" calcext:value-type="currency">
            <text:p>£0.35</text:p>
          </table:table-cell>
          <table:table-cell table:style-name="ce6" office:value-type="currency" office:currency="GBP" office:value="11.65" calcext:value-type="currency">
            <text:p>£11.65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ch_3RGQ3PALpcumAhEI2wcLFpMT</text:p>
          </table:table-cell>
          <table:table-cell office:value-type="float" office:value="568686" calcext:value-type="float">
            <text:p>56868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4" calcext:value-type="currency">
            <text:p>£0.24</text:p>
          </table:table-cell>
          <table:table-cell table:style-name="ce6" office:value-type="currency" office:currency="GBP" office:value="11.76" calcext:value-type="currency">
            <text:p>£11.76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2 Ring 1 - Working Hunter: 30cm</text:p>
          </table:table-cell>
          <table:table-cell office:value-type="string" calcext:value-type="string">
            <text:p>ch_3RGQ3PALpcumAhEI2wcLFpMT</text:p>
          </table:table-cell>
          <table:table-cell office:value-type="float" office:value="568686" calcext:value-type="float">
            <text:p>56868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4" calcext:value-type="currency">
            <text:p>£0.24</text:p>
          </table:table-cell>
          <table:table-cell table:style-name="ce6" office:value-type="currency" office:currency="GBP" office:value="11.76" calcext:value-type="currency">
            <text:p>£11.76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ch_3RGQ3PALpcumAhEI2wcLFpMT</text:p>
          </table:table-cell>
          <table:table-cell office:value-type="float" office:value="568686" calcext:value-type="float">
            <text:p>56868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4" calcext:value-type="currency">
            <text:p>£0.24</text:p>
          </table:table-cell>
          <table:table-cell table:style-name="ce6" office:value-type="currency" office:currency="GBP" office:value="11.76" calcext:value-type="currency">
            <text:p>£11.76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Izzy Miller-Smith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4 Ring 1 - Working Hunter: 50cm</text:p>
          </table:table-cell>
          <table:table-cell office:value-type="string" calcext:value-type="string">
            <text:p>ch_3RGQ5xALpcumAhEI0saF2hzn</text:p>
          </table:table-cell>
          <table:table-cell office:value-type="float" office:value="568688" calcext:value-type="float">
            <text:p>568688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Izzy Miller-Smith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ch_3RGQ5xALpcumAhEI0saF2hzn</text:p>
          </table:table-cell>
          <table:table-cell office:value-type="float" office:value="568688" calcext:value-type="float">
            <text:p>568688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Hayley Nelson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hiEALpcumAhEI1uUHGwUc</text:p>
          </table:table-cell>
          <table:table-cell office:value-type="float" office:value="568856" calcext:value-type="float">
            <text:p>568856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Sara Davies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hrKALpcumAhEI1rvtj5f2</text:p>
          </table:table-cell>
          <table:table-cell office:value-type="float" office:value="568859" calcext:value-type="float">
            <text:p>568859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09" calcext:value-type="currency">
            <text:p>£0.09</text:p>
          </table:table-cell>
          <table:table-cell table:style-name="ce6" office:value-type="currency" office:currency="GBP" office:value="4.91" calcext:value-type="currency">
            <text:p>£4.91</text:p>
          </table:table-cell>
          <table:table-cell table:number-columns-repeated="16369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pW3ALpcumAhEI3nQKHtgY</text:p>
          </table:table-cell>
          <table:table-cell office:value-type="float" office:value="568989" calcext:value-type="float">
            <text:p>568989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09" calcext:value-type="currency">
            <text:p>£0.09</text:p>
          </table:table-cell>
          <table:table-cell table:style-name="ce6" office:value-type="currency" office:currency="GBP" office:value="4.91" calcext:value-type="currency">
            <text:p>£4.91</text:p>
          </table:table-cell>
          <table:table-cell table:number-columns-repeated="16369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Hayley Nelson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ch_3RGhiEALpcumAhEI1uUHGwUc</text:p>
          </table:table-cell>
          <table:table-cell office:value-type="float" office:value="568856" calcext:value-type="float">
            <text:p>56885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Hayley Nelson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2 Ring 2 - Ridden Hunter: Open, over 14.2</text:p>
          </table:table-cell>
          <table:table-cell office:value-type="string" calcext:value-type="string">
            <text:p>ch_3RGhiEALpcumAhEI1uUHGwUc</text:p>
          </table:table-cell>
          <table:table-cell office:value-type="float" office:value="568856" calcext:value-type="float">
            <text:p>56885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Sara Davies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GhrKALpcumAhEI1rvtj5f2</text:p>
          </table:table-cell>
          <table:table-cell office:value-type="float" office:value="568859" calcext:value-type="float">
            <text:p>56885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11.77" calcext:value-type="currency">
            <text:p>£11.77</text:p>
          </table:table-cell>
          <table:table-cell table:style-name="ce6" office:value-type="currency" office:currency="GBP" office:value="0.37" calcext:value-type="currency">
            <text:p>£0.37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Sara Davies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ch_3RGhrKALpcumAhEI1rvtj5f2</text:p>
          </table:table-cell>
          <table:table-cell office:value-type="float" office:value="568859" calcext:value-type="float">
            <text:p>56885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11.77" calcext:value-type="currency">
            <text:p>£11.77</text:p>
          </table:table-cell>
          <table:table-cell table:style-name="ce6" office:value-type="currency" office:currency="GBP" office:value="0.37" calcext:value-type="currency">
            <text:p>£0.37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Sara Davies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ch_3RGhrKALpcumAhEI1rvtj5f2</text:p>
          </table:table-cell>
          <table:table-cell office:value-type="float" office:value="568859" calcext:value-type="float">
            <text:p>56885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11.77" calcext:value-type="currency">
            <text:p>£11.77</text:p>
          </table:table-cell>
          <table:table-cell table:style-name="ce6" office:value-type="currency" office:currency="GBP" office:value="0.38" calcext:value-type="currency">
            <text:p>£0.38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Sara Davies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8 Ring 1 - Working Hunter: 90cm</text:p>
          </table:table-cell>
          <table:table-cell office:value-type="string" calcext:value-type="string">
            <text:p>ch_3RGhrKALpcumAhEI1rvtj5f2</text:p>
          </table:table-cell>
          <table:table-cell office:value-type="float" office:value="568859" calcext:value-type="float">
            <text:p>56885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11.77" calcext:value-type="currency">
            <text:p>£11.77</text:p>
          </table:table-cell>
          <table:table-cell table:style-name="ce6" office:value-type="currency" office:currency="GBP" office:value="0.38" calcext:value-type="currency">
            <text:p>£0.38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2 Ring 1 - Working Hunter: 30cm</text:p>
          </table:table-cell>
          <table:table-cell office:value-type="string" calcext:value-type="string">
            <text:p>ch_3RGpW3ALpcumAhEI3nQKHtgY</text:p>
          </table:table-cell>
          <table:table-cell office:value-type="float" office:value="568989" calcext:value-type="float">
            <text:p>56898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3" calcext:value-type="currency">
            <text:p>£0.30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3 Ring 1 - Working Hunter: 40cm</text:p>
          </table:table-cell>
          <table:table-cell office:value-type="string" calcext:value-type="string">
            <text:p>ch_3RGpW3ALpcumAhEI3nQKHtgY</text:p>
          </table:table-cell>
          <table:table-cell office:value-type="float" office:value="568989" calcext:value-type="float">
            <text:p>56898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3" calcext:value-type="currency">
            <text:p>£0.30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GpW3ALpcumAhEI3nQKHtgY</text:p>
          </table:table-cell>
          <table:table-cell office:value-type="float" office:value="568989" calcext:value-type="float">
            <text:p>56898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3" calcext:value-type="currency">
            <text:p>£0.30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3 Ring 4 – <text:s/>Showjumping: 30cm</text:p>
          </table:table-cell>
          <table:table-cell office:value-type="string" calcext:value-type="string">
            <text:p>ch_3RGpW3ALpcumAhEI3nQKHtgY</text:p>
          </table:table-cell>
          <table:table-cell office:value-type="float" office:value="568989" calcext:value-type="float">
            <text:p>56898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3" calcext:value-type="currency">
            <text:p>£0.30</text:p>
          </table:table-cell>
          <table:table-cell table:number-columns-repeated="16368"/>
        </table:table-row>
        <table:table-row table:style-name="ro3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4 Ring 4 – <text:s/>Showjumping: 40cm</text:p>
          </table:table-cell>
          <table:table-cell office:value-type="string" calcext:value-type="string">
            <text:p>ch_3RGpW3ALpcumAhEI3nQKHtgY</text:p>
          </table:table-cell>
          <table:table-cell office:value-type="float" office:value="568989" calcext:value-type="float">
            <text:p>56898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3" calcext:value-type="currency">
            <text:p>£0.30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Adrie <text:s/>Morgan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GxEbALpcumAhEI2tROzPa3</text:p>
          </table:table-cell>
          <table:table-cell office:value-type="float" office:value="569002" calcext:value-type="float">
            <text:p>569002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09" calcext:value-type="currency">
            <text:p>£0.09</text:p>
          </table:table-cell>
          <table:table-cell table:style-name="ce6" office:value-type="currency" office:currency="GBP" office:value="4.91" calcext:value-type="currency">
            <text:p>£4.91</text:p>
          </table:table-cell>
          <table:table-cell table:number-columns-repeated="16369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Savanna Boyd</text:p>
          </table:table-cell>
          <table:table-cell office:value-type="string" calcext:value-type="string">
            <text:p>brookboyd@btinternet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7hKALpcumAhEI1u75sz9j</text:p>
          </table:table-cell>
          <table:table-cell office:value-type="float" office:value="569114" calcext:value-type="float">
            <text:p>569114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Emma Kennedy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7vfALpcumAhEI1iguYmpV</text:p>
          </table:table-cell>
          <table:table-cell office:value-type="float" office:value="569117" calcext:value-type="float">
            <text:p>569117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ApHALpcumAhEI31oiZC8f</text:p>
          </table:table-cell>
          <table:table-cell office:value-type="float" office:value="569186" calcext:value-type="float">
            <text:p>569186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Adrie <text:s/>Morgan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ch_3RGxEbALpcumAhEI2tROzPa3</text:p>
          </table:table-cell>
          <table:table-cell office:value-type="float" office:value="569002" calcext:value-type="float">
            <text:p>56900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Adrie <text:s/>Morgan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GxEbALpcumAhEI2tROzPa3</text:p>
          </table:table-cell>
          <table:table-cell office:value-type="float" office:value="569002" calcext:value-type="float">
            <text:p>56900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Adrie <text:s/>Morgan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1 Ring 2 - Riding Club Equine: Open, over 14.2</text:p>
          </table:table-cell>
          <table:table-cell office:value-type="string" calcext:value-type="string">
            <text:p>ch_3RGxEbALpcumAhEI2tROzPa3</text:p>
          </table:table-cell>
          <table:table-cell office:value-type="float" office:value="569002" calcext:value-type="float">
            <text:p>56900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Adrie <text:s/>Morgan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2 Ring 2 - Ridden Hunter: Open, over 14.2</text:p>
          </table:table-cell>
          <table:table-cell office:value-type="string" calcext:value-type="string">
            <text:p>ch_3RGxEbALpcumAhEI2tROzPa3</text:p>
          </table:table-cell>
          <table:table-cell office:value-type="float" office:value="569002" calcext:value-type="float">
            <text:p>56900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Adrie <text:s/>Morgan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GxEbALpcumAhEI2tROzPa3</text:p>
          </table:table-cell>
          <table:table-cell office:value-type="float" office:value="569002" calcext:value-type="float">
            <text:p>56900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Adrie <text:s/>Morgan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4 Ring 3 - Hazard Obedience Course Intermediate: horses over 14.2</text:p>
          </table:table-cell>
          <table:table-cell office:value-type="string" calcext:value-type="string">
            <text:p>ch_3RGxEbALpcumAhEI2tROzPa3</text:p>
          </table:table-cell>
          <table:table-cell office:value-type="float" office:value="569002" calcext:value-type="float">
            <text:p>56900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Savanna Boyd</text:p>
          </table:table-cell>
          <table:table-cell office:value-type="string" calcext:value-type="string">
            <text:p>brookboyd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H7hKALpcumAhEI1u75sz9j</text:p>
          </table:table-cell>
          <table:table-cell office:value-type="float" office:value="569114" calcext:value-type="float">
            <text:p>56911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5" calcext:value-type="currency">
            <text:p>£0.35</text:p>
          </table:table-cell>
          <table:table-cell table:style-name="ce6" office:value-type="currency" office:currency="GBP" office:value="11.65" calcext:value-type="currency">
            <text:p>£11.65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Emma Kennedy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5 Ring 2 - Lead Rein &amp; Thelwell type pony </text:p>
          </table:table-cell>
          <table:table-cell office:value-type="string" calcext:value-type="string">
            <text:p>ch_3RH7vfALpcumAhEI1iguYmpV</text:p>
          </table:table-cell>
          <table:table-cell office:value-type="float" office:value="569117" calcext:value-type="float">
            <text:p>56911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Emma Kennedy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1 Ring 4 – Showjumping: Cross poles, Riders under 10, Lead rein</text:p>
          </table:table-cell>
          <table:table-cell office:value-type="string" calcext:value-type="string">
            <text:p>ch_3RH7vfALpcumAhEI1iguYmpV</text:p>
          </table:table-cell>
          <table:table-cell office:value-type="float" office:value="569117" calcext:value-type="float">
            <text:p>56911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HApHALpcumAhEI31oiZC8f</text:p>
          </table:table-cell>
          <table:table-cell office:value-type="float" office:value="569186" calcext:value-type="float">
            <text:p>56918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ch_3RHApHALpcumAhEI31oiZC8f</text:p>
          </table:table-cell>
          <table:table-cell office:value-type="float" office:value="569186" calcext:value-type="float">
            <text:p>56918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Chelsea <text:s/>Hamilton</text:p>
          </table:table-cell>
          <table:table-cell office:value-type="string" calcext:value-type="string">
            <text:p>Chels.246.135@icloud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KZCALpcumAhEI3g4oYObj</text:p>
          </table:table-cell>
          <table:table-cell office:value-type="float" office:value="569216" calcext:value-type="float">
            <text:p>569216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Aileen Craig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L60ALpcumAhEI1jg4kKV2</text:p>
          </table:table-cell>
          <table:table-cell office:value-type="float" office:value="569228" calcext:value-type="float">
            <text:p>569228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Aynsley Sawyers</text:p>
          </table:table-cell>
          <table:table-cell office:value-type="string" calcext:value-type="string">
            <text:p>Megansawyers09@outlook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VD7ALpcumAhEI2suF3rGV</text:p>
          </table:table-cell>
          <table:table-cell office:value-type="float" office:value="569337" calcext:value-type="float">
            <text:p>569337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RHONA Donald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VFsALpcumAhEI1JvBxA00</text:p>
          </table:table-cell>
          <table:table-cell office:value-type="float" office:value="569343" calcext:value-type="float">
            <text:p>569343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Chelsea <text:s/>Hamilton</text:p>
          </table:table-cell>
          <table:table-cell office:value-type="string" calcext:value-type="string">
            <text:p>Chels.246.135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ch_3RHKZCALpcumAhEI3g4oYObj</text:p>
          </table:table-cell>
          <table:table-cell office:value-type="float" office:value="569216" calcext:value-type="float">
            <text:p>56921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5" calcext:value-type="currency">
            <text:p>£0.35</text:p>
          </table:table-cell>
          <table:table-cell table:style-name="ce6" office:value-type="currency" office:currency="GBP" office:value="11.65" calcext:value-type="currency">
            <text:p>£11.65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Aileen Craig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3 Ring 1 - Working Hunter: 40cm</text:p>
          </table:table-cell>
          <table:table-cell office:value-type="string" calcext:value-type="string">
            <text:p>ch_3RHL60ALpcumAhEI1jg4kKV2</text:p>
          </table:table-cell>
          <table:table-cell office:value-type="float" office:value="569228" calcext:value-type="float">
            <text:p>569228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3" calcext:value-type="currency">
            <text:p>£0.33</text:p>
          </table:table-cell>
          <table:table-cell table:style-name="ce6" office:value-type="currency" office:currency="GBP" office:value="11.67" calcext:value-type="currency">
            <text:p>£11.67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Aileen Craig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4 Ring 1 - Working Hunter: 50cm</text:p>
          </table:table-cell>
          <table:table-cell office:value-type="string" calcext:value-type="string">
            <text:p>ch_3RHL60ALpcumAhEI1jg4kKV2</text:p>
          </table:table-cell>
          <table:table-cell office:value-type="float" office:value="569228" calcext:value-type="float">
            <text:p>569228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3" calcext:value-type="currency">
            <text:p>£0.33</text:p>
          </table:table-cell>
          <table:table-cell table:style-name="ce6" office:value-type="currency" office:currency="GBP" office:value="11.67" calcext:value-type="currency">
            <text:p>£11.67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Aynsley Sawyers</text:p>
          </table:table-cell>
          <table:table-cell office:value-type="string" calcext:value-type="string">
            <text:p>Megansawyers09@outlook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6 Ring 4 – <text:s/>Showjumping: 60cm</text:p>
          </table:table-cell>
          <table:table-cell office:value-type="string" calcext:value-type="string">
            <text:p>ch_3RHVD7ALpcumAhEI2suF3rGV</text:p>
          </table:table-cell>
          <table:table-cell office:value-type="float" office:value="569337" calcext:value-type="float">
            <text:p>56933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5" calcext:value-type="currency">
            <text:p>£0.35</text:p>
          </table:table-cell>
          <table:table-cell table:style-name="ce6" office:value-type="currency" office:currency="GBP" office:value="11.65" calcext:value-type="currency">
            <text:p>£11.65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RHONA Donald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ch_3RHVFsALpcumAhEI1JvBxA00</text:p>
          </table:table-cell>
          <table:table-cell office:value-type="float" office:value="569343" calcext:value-type="float">
            <text:p>56934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RHONA Donald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HVFsALpcumAhEI1JvBxA00</text:p>
          </table:table-cell>
          <table:table-cell office:value-type="float" office:value="569343" calcext:value-type="float">
            <text:p>56934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fpWALpcumAhEI3CogXJwN</text:p>
          </table:table-cell>
          <table:table-cell office:value-type="float" office:value="569402" calcext:value-type="float">
            <text:p>569402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Kelly <text:s/>Mitchell </text:p>
          </table:table-cell>
          <table:table-cell office:value-type="string" calcext:value-type="string">
            <text:p>kelly_89_m@yahoo.co.uk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h9NALpcumAhEI2kh5Uim9</text:p>
          </table:table-cell>
          <table:table-cell office:value-type="float" office:value="569419" calcext:value-type="float">
            <text:p>569419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Marguerita Taylor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i6EALpcumAhEI3zGtqhJI</text:p>
          </table:table-cell>
          <table:table-cell office:value-type="float" office:value="569434" calcext:value-type="float">
            <text:p>569434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Carol Ann Weir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iVMALpcumAhEI1ZYgnXjV</text:p>
          </table:table-cell>
          <table:table-cell office:value-type="float" office:value="569437" calcext:value-type="float">
            <text:p>569437</text:p>
          </table:table-cell>
          <table:table-cell table:style-name="ce6" office:value-type="currency" office:currency="GBP" office:value="10" calcext:value-type="currency">
            <text:p>£10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0" calcext:value-type="currency">
            <text:p>£10.00</text:p>
          </table:table-cell>
          <table:table-cell table:style-name="ce6" office:value-type="currency" office:currency="GBP" office:value="0.21" calcext:value-type="currency">
            <text:p>£0.21</text:p>
          </table:table-cell>
          <table:table-cell table:style-name="ce6" office:value-type="currency" office:currency="GBP" office:value="9.79" calcext:value-type="currency">
            <text:p>£9.79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iWzALpcumAhEI0hzJ5sx8</text:p>
          </table:table-cell>
          <table:table-cell office:value-type="float" office:value="569440" calcext:value-type="float">
            <text:p>56944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" calcext:value-type="currency">
            <text:p>£0.10</text:p>
          </table:table-cell>
          <table:table-cell table:style-name="ce6" office:value-type="currency" office:currency="GBP" office:value="4.9" calcext:value-type="currency">
            <text:p>£4.90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Rosalind <text:s/>Gordon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ivwALpcumAhEI0WWw8mng</text:p>
          </table:table-cell>
          <table:table-cell office:value-type="float" office:value="569449" calcext:value-type="float">
            <text:p>569449</text:p>
          </table:table-cell>
          <table:table-cell table:style-name="ce6" office:value-type="currency" office:currency="GBP" office:value="10" calcext:value-type="currency">
            <text:p>£10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0" calcext:value-type="currency">
            <text:p>£10.00</text:p>
          </table:table-cell>
          <table:table-cell table:style-name="ce6" office:value-type="currency" office:currency="GBP" office:value="0.17" calcext:value-type="currency">
            <text:p>£0.17</text:p>
          </table:table-cell>
          <table:table-cell table:style-name="ce6" office:value-type="currency" office:currency="GBP" office:value="9.83" calcext:value-type="currency">
            <text:p>£9.83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Lynda Campbell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kWWALpcumAhEI0o7RFX9Z</text:p>
          </table:table-cell>
          <table:table-cell office:value-type="float" office:value="569465" calcext:value-type="float">
            <text:p>569465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aj connor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nX8ALpcumAhEI2gvBERm3</text:p>
          </table:table-cell>
          <table:table-cell office:value-type="float" office:value="569501" calcext:value-type="float">
            <text:p>569501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09" calcext:value-type="currency">
            <text:p>£0.09</text:p>
          </table:table-cell>
          <table:table-cell table:style-name="ce6" office:value-type="currency" office:currency="GBP" office:value="4.91" calcext:value-type="currency">
            <text:p>£4.91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Gill Macdonald</text:p>
          </table:table-cell>
          <table:table-cell office:value-type="string" calcext:value-type="string">
            <text:p>Gillmacd@icloud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rSgALpcumAhEI33OQRg77</text:p>
          </table:table-cell>
          <table:table-cell office:value-type="float" office:value="569534" calcext:value-type="float">
            <text:p>569534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Emma Byrne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s70ALpcumAhEI1VLwRH8V</text:p>
          </table:table-cell>
          <table:table-cell office:value-type="float" office:value="569546" calcext:value-type="float">
            <text:p>569546</text:p>
          </table:table-cell>
          <table:table-cell table:style-name="ce6" office:value-type="currency" office:currency="GBP" office:value="10" calcext:value-type="currency">
            <text:p>£10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0" calcext:value-type="currency">
            <text:p>£10.00</text:p>
          </table:table-cell>
          <table:table-cell table:style-name="ce6" office:value-type="currency" office:currency="GBP" office:value="0.18" calcext:value-type="currency">
            <text:p>£0.18</text:p>
          </table:table-cell>
          <table:table-cell table:style-name="ce6" office:value-type="currency" office:currency="GBP" office:value="9.82" calcext:value-type="currency">
            <text:p>£9.82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Meaghan McDiarmid</text:p>
          </table:table-cell>
          <table:table-cell office:value-type="string" calcext:value-type="string">
            <text:p>mmcdiarmid87@gmail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sNvALpcumAhEI38PBieqU</text:p>
          </table:table-cell>
          <table:table-cell office:value-type="float" office:value="569550" calcext:value-type="float">
            <text:p>56955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Kirsten Dyer</text:p>
          </table:table-cell>
          <table:table-cell office:value-type="string" calcext:value-type="string">
            <text:p>kirstendyer@msn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tG6ALpcumAhEI1J0wJwy5</text:p>
          </table:table-cell>
          <table:table-cell office:value-type="float" office:value="569559" calcext:value-type="float">
            <text:p>569559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3" calcext:value-type="currency">
            <text:p>£0.13</text:p>
          </table:table-cell>
          <table:table-cell table:style-name="ce6" office:value-type="currency" office:currency="GBP" office:value="4.87" calcext:value-type="currency">
            <text:p>£4.87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James Blane</text:p>
          </table:table-cell>
          <table:table-cell office:value-type="string" calcext:value-type="string">
            <text:p>jamesblane19@yahoo.c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undonald Show 2025</text:p>
          </table:table-cell>
          <table:table-cell office:value-type="string" calcext:value-type="string">
            <text:p>Mandatory First Aid Cover</text:p>
          </table:table-cell>
          <table:table-cell office:value-type="string" calcext:value-type="string">
            <text:p>ch_3RHtavALpcumAhEI3nUgmSp0</text:p>
          </table:table-cell>
          <table:table-cell office:value-type="float" office:value="569564" calcext:value-type="float">
            <text:p>569564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5" calcext:value-type="currency">
            <text:p>£5.00</text:p>
          </table:table-cell>
          <table:table-cell table:style-name="ce6" office:value-type="currency" office:currency="GBP" office:value="0.11" calcext:value-type="currency">
            <text:p>£0.11</text:p>
          </table:table-cell>
          <table:table-cell table:style-name="ce6" office:value-type="currency" office:currency="GBP" office:value="4.89" calcext:value-type="currency">
            <text:p>£4.89</text:p>
          </table:table-cell>
          <table:table-cell table:number-columns-repeated="16369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4 Ring 1 - Working Hunter: 50cm</text:p>
          </table:table-cell>
          <table:table-cell office:value-type="string" calcext:value-type="string">
            <text:p>ch_3RHfpWALpcumAhEI3CogXJwN</text:p>
          </table:table-cell>
          <table:table-cell office:value-type="float" office:value="569402" calcext:value-type="float">
            <text:p>56940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ch_3RHfpWALpcumAhEI3CogXJwN</text:p>
          </table:table-cell>
          <table:table-cell office:value-type="float" office:value="569402" calcext:value-type="float">
            <text:p>569402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Kelly <text:s/>Mitchell </text:p>
          </table:table-cell>
          <table:table-cell office:value-type="string" calcext:value-type="string">
            <text:p>kelly_89_m@yahoo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8 Ring 4 – <text:s/>Showjumping: 80cm</text:p>
          </table:table-cell>
          <table:table-cell office:value-type="string" calcext:value-type="string">
            <text:p>ch_3RHh9NALpcumAhEI2kh5Uim9</text:p>
          </table:table-cell>
          <table:table-cell office:value-type="float" office:value="569419" calcext:value-type="float">
            <text:p>56941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5" calcext:value-type="currency">
            <text:p>£0.35</text:p>
          </table:table-cell>
          <table:table-cell table:style-name="ce6" office:value-type="currency" office:currency="GBP" office:value="11.65" calcext:value-type="currency">
            <text:p>£11.65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Marguerita Taylor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7 Ring 4 – <text:s/>Showjumping: 70cm</text:p>
          </table:table-cell>
          <table:table-cell office:value-type="string" calcext:value-type="string">
            <text:p>ch_3RHi6EALpcumAhEI3zGtqhJI</text:p>
          </table:table-cell>
          <table:table-cell office:value-type="float" office:value="569434" calcext:value-type="float">
            <text:p>56943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Marguerita Taylor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8 Ring 4 – <text:s/>Showjumping: 80cm</text:p>
          </table:table-cell>
          <table:table-cell office:value-type="string" calcext:value-type="string">
            <text:p>ch_3RHi6EALpcumAhEI3zGtqhJI</text:p>
          </table:table-cell>
          <table:table-cell office:value-type="float" office:value="569434" calcext:value-type="float">
            <text:p>56943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Carol Ann Weir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ch_3RHiVMALpcumAhEI1ZYgnXjV</text:p>
          </table:table-cell>
          <table:table-cell office:value-type="float" office:value="569437" calcext:value-type="float">
            <text:p>56943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6" calcext:value-type="currency">
            <text:p>£0.26</text:p>
          </table:table-cell>
          <table:table-cell table:style-name="ce6" office:value-type="currency" office:currency="GBP" office:value="11.74" calcext:value-type="currency">
            <text:p>£11.74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Carol Ann Weir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1 Ring 3 - Hazard Obedience Course Novice: horses under 14.2</text:p>
          </table:table-cell>
          <table:table-cell office:value-type="string" calcext:value-type="string">
            <text:p>ch_3RHiVMALpcumAhEI1ZYgnXjV</text:p>
          </table:table-cell>
          <table:table-cell office:value-type="float" office:value="569437" calcext:value-type="float">
            <text:p>569437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6" calcext:value-type="currency">
            <text:p>£0.26</text:p>
          </table:table-cell>
          <table:table-cell table:style-name="ce6" office:value-type="currency" office:currency="GBP" office:value="11.74" calcext:value-type="currency">
            <text:p>£11.74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1 Ring 2 - Riding Club Equine: Open, over 14.2</text:p>
          </table:table-cell>
          <table:table-cell office:value-type="string" calcext:value-type="string">
            <text:p>ch_3RHiWzALpcumAhEI0hzJ5sx8</text:p>
          </table:table-cell>
          <table:table-cell office:value-type="float" office:value="569440" calcext:value-type="float">
            <text:p>56944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2 Ring 3 - Hazard Obedience Course Novice: horses over 14.2</text:p>
          </table:table-cell>
          <table:table-cell office:value-type="string" calcext:value-type="string">
            <text:p>ch_3RHiWzALpcumAhEI0hzJ5sx8</text:p>
          </table:table-cell>
          <table:table-cell office:value-type="float" office:value="569440" calcext:value-type="float">
            <text:p>56944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1 Ring 4 – Showjumping: Cross poles, Riders under 10, Lead rein</text:p>
          </table:table-cell>
          <table:table-cell office:value-type="string" calcext:value-type="string">
            <text:p>ch_3RHiWzALpcumAhEI0hzJ5sx8</text:p>
          </table:table-cell>
          <table:table-cell office:value-type="float" office:value="569440" calcext:value-type="float">
            <text:p>56944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style-name="ce6" office:value-type="currency" office:currency="GBP" office:value="11.75" calcext:value-type="currency">
            <text:p>£11.75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Rosalind <text:s/>Gordon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ch_3RHivwALpcumAhEI0WWw8mng</text:p>
          </table:table-cell>
          <table:table-cell office:value-type="float" office:value="569449" calcext:value-type="float">
            <text:p>56944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1" calcext:value-type="currency">
            <text:p>£0.21</text:p>
          </table:table-cell>
          <table:table-cell table:style-name="ce6" office:value-type="currency" office:currency="GBP" office:value="11.79" calcext:value-type="currency">
            <text:p>£11.79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Rosalind <text:s/>Gordon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ch_3RHivwALpcumAhEI0WWw8mng</text:p>
          </table:table-cell>
          <table:table-cell office:value-type="float" office:value="569449" calcext:value-type="float">
            <text:p>56944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1" calcext:value-type="currency">
            <text:p>£0.21</text:p>
          </table:table-cell>
          <table:table-cell table:style-name="ce6" office:value-type="currency" office:currency="GBP" office:value="11.79" calcext:value-type="currency">
            <text:p>£11.79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Rosalind <text:s/>Gordon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2 Ring 1 - Working Hunter: 30cm</text:p>
          </table:table-cell>
          <table:table-cell office:value-type="string" calcext:value-type="string">
            <text:p>ch_3RHivwALpcumAhEI0WWw8mng</text:p>
          </table:table-cell>
          <table:table-cell office:value-type="float" office:value="569449" calcext:value-type="float">
            <text:p>56944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1" calcext:value-type="currency">
            <text:p>£0.21</text:p>
          </table:table-cell>
          <table:table-cell table:style-name="ce6" office:value-type="currency" office:currency="GBP" office:value="11.79" calcext:value-type="currency">
            <text:p>£11.79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Rosalind <text:s/>Gordon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3 Ring 1 - Working Hunter: 40cm</text:p>
          </table:table-cell>
          <table:table-cell office:value-type="string" calcext:value-type="string">
            <text:p>ch_3RHivwALpcumAhEI0WWw8mng</text:p>
          </table:table-cell>
          <table:table-cell office:value-type="float" office:value="569449" calcext:value-type="float">
            <text:p>56944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1" calcext:value-type="currency">
            <text:p>£0.21</text:p>
          </table:table-cell>
          <table:table-cell table:style-name="ce6" office:value-type="currency" office:currency="GBP" office:value="11.79" calcext:value-type="currency">
            <text:p>£11.79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Rosalind <text:s/>Gordon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1 Ring 4 – Showjumping: Cross poles, Riders under 10, Lead rein</text:p>
          </table:table-cell>
          <table:table-cell office:value-type="string" calcext:value-type="string">
            <text:p>ch_3RHivwALpcumAhEI0WWw8mng</text:p>
          </table:table-cell>
          <table:table-cell office:value-type="float" office:value="569449" calcext:value-type="float">
            <text:p>56944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1" calcext:value-type="currency">
            <text:p>£0.21</text:p>
          </table:table-cell>
          <table:table-cell table:style-name="ce6" office:value-type="currency" office:currency="GBP" office:value="11.79" calcext:value-type="currency">
            <text:p>£11.79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Rosalind <text:s/>Gordon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2 Ring 4 – <text:s/>Showjumping: Cross poles, Riders under 10, First Ridden</text:p>
          </table:table-cell>
          <table:table-cell office:value-type="string" calcext:value-type="string">
            <text:p>ch_3RHivwALpcumAhEI0WWw8mng</text:p>
          </table:table-cell>
          <table:table-cell office:value-type="float" office:value="569449" calcext:value-type="float">
            <text:p>56944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1" calcext:value-type="currency">
            <text:p>£0.21</text:p>
          </table:table-cell>
          <table:table-cell table:style-name="ce6" office:value-type="currency" office:currency="GBP" office:value="11.79" calcext:value-type="currency">
            <text:p>£11.79</text:p>
          </table:table-cell>
          <table:table-cell table:style-name="ce6" office:value-type="currency" office:currency="GBP" office:value="0.25" calcext:value-type="currency">
            <text:p>£0.2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Lynda Campbell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ch_3RHkWWALpcumAhEI0o7RFX9Z</text:p>
          </table:table-cell>
          <table:table-cell office:value-type="float" office:value="569465" calcext:value-type="float">
            <text:p>569465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Lynda Campbell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HkWWALpcumAhEI0o7RFX9Z</text:p>
          </table:table-cell>
          <table:table-cell office:value-type="float" office:value="569465" calcext:value-type="float">
            <text:p>569465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aj connor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ch_3RHnX8ALpcumAhEI2gvBERm3</text:p>
          </table:table-cell>
          <table:table-cell office:value-type="float" office:value="569501" calcext:value-type="float">
            <text:p>56950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11.77" calcext:value-type="currency">
            <text:p>£11.77</text:p>
          </table:table-cell>
          <table:table-cell table:style-name="ce6" office:value-type="currency" office:currency="GBP" office:value="0.37" calcext:value-type="currency">
            <text:p>£0.37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aj connor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HnX8ALpcumAhEI2gvBERm3</text:p>
          </table:table-cell>
          <table:table-cell office:value-type="float" office:value="569501" calcext:value-type="float">
            <text:p>56950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11.77" calcext:value-type="currency">
            <text:p>£11.77</text:p>
          </table:table-cell>
          <table:table-cell table:style-name="ce6" office:value-type="currency" office:currency="GBP" office:value="0.37" calcext:value-type="currency">
            <text:p>£0.37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aj connor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ch_3RHnX8ALpcumAhEI2gvBERm3</text:p>
          </table:table-cell>
          <table:table-cell office:value-type="float" office:value="569501" calcext:value-type="float">
            <text:p>56950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11.77" calcext:value-type="currency">
            <text:p>£11.77</text:p>
          </table:table-cell>
          <table:table-cell table:style-name="ce6" office:value-type="currency" office:currency="GBP" office:value="0.38" calcext:value-type="currency">
            <text:p>£0.38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aj connor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HnX8ALpcumAhEI2gvBERm3</text:p>
          </table:table-cell>
          <table:table-cell office:value-type="float" office:value="569501" calcext:value-type="float">
            <text:p>56950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3" calcext:value-type="currency">
            <text:p>£0.23</text:p>
          </table:table-cell>
          <table:table-cell table:style-name="ce6" office:value-type="currency" office:currency="GBP" office:value="11.77" calcext:value-type="currency">
            <text:p>£11.77</text:p>
          </table:table-cell>
          <table:table-cell table:style-name="ce6" office:value-type="currency" office:currency="GBP" office:value="0.38" calcext:value-type="currency">
            <text:p>£0.38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Rosalind <text:s/>Gordon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3 Ring 4 – <text:s/>Showjumping: 30cm</text:p>
          </table:table-cell>
          <table:table-cell office:value-type="string" calcext:value-type="string">
            <text:p>ch_3RHqMpALpcumAhEI1Cxg9K4I</text:p>
          </table:table-cell>
          <table:table-cell office:value-type="float" office:value="569523" calcext:value-type="float">
            <text:p>56952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Rosalind <text:s/>Gordon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44 Ring 4 – <text:s/>Showjumping: 40cm</text:p>
          </table:table-cell>
          <table:table-cell office:value-type="string" calcext:value-type="string">
            <text:p>ch_3RHqMpALpcumAhEI1Cxg9K4I</text:p>
          </table:table-cell>
          <table:table-cell office:value-type="float" office:value="569523" calcext:value-type="float">
            <text:p>569523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11.71" calcext:value-type="currency">
            <text:p>£11.71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Gill Macdonald</text:p>
          </table:table-cell>
          <table:table-cell office:value-type="string" calcext:value-type="string">
            <text:p>Gillmacd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HrSgALpcumAhEI33OQRg77</text:p>
          </table:table-cell>
          <table:table-cell office:value-type="float" office:value="569534" calcext:value-type="float">
            <text:p>56953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Gill Macdonald</text:p>
          </table:table-cell>
          <table:table-cell office:value-type="string" calcext:value-type="string">
            <text:p>Gillmacd@icloud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1 Ring 2 - Riding Club Equine: Open, over 14.2</text:p>
          </table:table-cell>
          <table:table-cell office:value-type="string" calcext:value-type="string">
            <text:p>ch_3RHrSgALpcumAhEI33OQRg77</text:p>
          </table:table-cell>
          <table:table-cell office:value-type="float" office:value="569534" calcext:value-type="float">
            <text:p>56953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Emma Byrne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Hs70ALpcumAhEI1VLwRH8V</text:p>
          </table:table-cell>
          <table:table-cell office:value-type="float" office:value="569546" calcext:value-type="float">
            <text:p>56954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3" calcext:value-type="currency">
            <text:p>£0.3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Emma Byrne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Hs70ALpcumAhEI1VLwRH8V</text:p>
          </table:table-cell>
          <table:table-cell office:value-type="float" office:value="569546" calcext:value-type="float">
            <text:p>56954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3" calcext:value-type="currency">
            <text:p>£0.3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Emma Byrne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ch_3RHs70ALpcumAhEI1VLwRH8V</text:p>
          </table:table-cell>
          <table:table-cell office:value-type="float" office:value="569546" calcext:value-type="float">
            <text:p>56954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3" calcext:value-type="currency">
            <text:p>£0.3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Emma Byrne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ch_3RHs70ALpcumAhEI1VLwRH8V</text:p>
          </table:table-cell>
          <table:table-cell office:value-type="float" office:value="569546" calcext:value-type="float">
            <text:p>56954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3" calcext:value-type="currency">
            <text:p>£0.3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Emma Byrne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3 Ring 2 - Best Turned Out</text:p>
          </table:table-cell>
          <table:table-cell office:value-type="string" calcext:value-type="string">
            <text:p>ch_3RHs70ALpcumAhEI1VLwRH8V</text:p>
          </table:table-cell>
          <table:table-cell office:value-type="float" office:value="569546" calcext:value-type="float">
            <text:p>569546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11.78" calcext:value-type="currency">
            <text:p>£11.78</text:p>
          </table:table-cell>
          <table:table-cell table:style-name="ce6" office:value-type="currency" office:currency="GBP" office:value="0.3" calcext:value-type="currency">
            <text:p>£0.3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Meaghan McDiarmid</text:p>
          </table:table-cell>
          <table:table-cell office:value-type="string" calcext:value-type="string">
            <text:p>mmcdiarmid87@gmail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ch_3RHsNvALpcumAhEI38PBieqU</text:p>
          </table:table-cell>
          <table:table-cell office:value-type="float" office:value="569550" calcext:value-type="float">
            <text:p>56955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5" calcext:value-type="currency">
            <text:p>£0.35</text:p>
          </table:table-cell>
          <table:table-cell table:style-name="ce6" office:value-type="currency" office:currency="GBP" office:value="11.65" calcext:value-type="currency">
            <text:p>£11.65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Kirsten Dyer</text:p>
          </table:table-cell>
          <table:table-cell office:value-type="string" calcext:value-type="string">
            <text:p>kirstendyer@msn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32 Ring 3 - Hazard Obedience Course Novice: horses over 14.2</text:p>
          </table:table-cell>
          <table:table-cell office:value-type="string" calcext:value-type="string">
            <text:p>ch_3RHtG6ALpcumAhEI1J0wJwy5</text:p>
          </table:table-cell>
          <table:table-cell office:value-type="float" office:value="569559" calcext:value-type="float">
            <text:p>569559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35" calcext:value-type="currency">
            <text:p>£0.35</text:p>
          </table:table-cell>
          <table:table-cell table:style-name="ce6" office:value-type="currency" office:currency="GBP" office:value="11.65" calcext:value-type="currency">
            <text:p>£11.65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James Blane</text:p>
          </table:table-cell>
          <table:table-cell office:value-type="string" calcext:value-type="string">
            <text:p>jamesblane19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ch_3RHtavALpcumAhEI3nUgmSp0</text:p>
          </table:table-cell>
          <table:table-cell office:value-type="float" office:value="569564" calcext:value-type="float">
            <text:p>56956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James Blane</text:p>
          </table:table-cell>
          <table:table-cell office:value-type="string" calcext:value-type="string">
            <text:p>jamesblane19@yahoo.com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Dundonald Show 2025</text:p>
          </table:table-cell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ch_3RHtavALpcumAhEI3nUgmSp0</text:p>
          </table:table-cell>
          <table:table-cell office:value-type="float" office:value="569564" calcext:value-type="float">
            <text:p>569564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6" office:value-type="currency" office:currency="GBP" office:value="0" calcext:value-type="currency">
            <text:p>£0.00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table:style-name="ce6" office:value-type="currency" office:currency="GBP" office:value="0.28" calcext:value-type="currency">
            <text:p>£0.28</text:p>
          </table:table-cell>
          <table:table-cell table:style-name="ce6" office:value-type="currency" office:currency="GBP" office:value="11.72" calcext:value-type="currency">
            <text:p>£11.72</text:p>
          </table:table-cell>
          <table:table-cell table:style-name="ce6" office:value-type="currency" office:currency="GBP" office:value="0.75" calcext:value-type="currency">
            <text:p>£0.75</text:p>
          </table:table-cell>
          <table:table-cell table:number-columns-repeated="16368"/>
        </table:table-row>
        <table:table-row table:style-name="ro3" table:number-rows-repeated="104840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EquoEvents_Dundonald-Show-2025_Online_Income_20250520'.A2:'EquoEvents_Dundonald-Show-2025_Online_Income_20250520'.P17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2:43:50.756084419</dc:date>
    <meta:editing-duration>PT1H41M24S</meta:editing-duration>
    <meta:editing-cycles>2</meta:editing-cycles>
    <meta:generator>LibreOffice/7.4.7.2$Linux_X86_64 LibreOffice_project/40$Build-2</meta:generator>
    <meta:document-statistic meta:table-count="1" meta:cell-count="2652" meta:object-count="0"/>
  </office:meta>
</office:document-meta>
</file>